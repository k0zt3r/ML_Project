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6_fi0" style:family="paragraph" style:parent-style-name="s16">
      <style:paragraph-properties fo:text-indent="0mm"/>
    </style:style>
    <style:style style:name="s1_right_fi0" style:family="paragraph" style:parent-style-name="s1">
      <style:paragraph-properties fo:text-align="right" fo:text-indent="0mm"/>
    </style:style>
    <style:style style:name="s1_fi0" style:family="paragraph" style:parent-style-name="s1">
      <style:paragraph-properties fo:text-indent="0mm"/>
    </style:style>
    <!-- Table cells styles -->
    <!-- Table columns styles -->
    <style:style style:name="3400" style:family="table-column">
      <style:table-column-properties style:column-width="60mm"/>
    </style:style>
    <style:style style:name="6806" style:family="table-column">
      <style:table-column-properties style:column-width="120mm"/>
    </style:style>
    <!-- Table styles -->
    <style:style style:name="rubber" style:family="table">
      <style:table-properties style:rel-width="100%" table:align="center"/>
    </style:style>
    <style:style style:name="10206" style:family="table">
      <style:table-properties style:width="180mm" table:align="left"/>
    </style:style>
  </office:automatic-styles>
  <office:body>
    <office:text text:use-soft-page-breaks="true">
      <text:h text:outline-level="1" text:style-name="s3"><text:bookmark text:name="anchor0"/><text:a xlink:type="simple" xlink:href="http://ivo.garant.ru/document/redirect/12136454/0">Федеральный закон от 29 июля 2004 г. N 98-ФЗ
"О коммерческой тайне"</text:a></text:h>
      <text:p text:style-name="s52header">С изменениями и дополнениями от:</text:p>
      <text:p text:style-name="s52">2 февраля, 18 декабря 2006 г., 24 июля 2007 г., 11 июля 2011 г., 12 марта 2014 г., 18 апреля 2018 г., 9 марта 2021 г., 14 июля 2022 г., 8 августа 2024 г.</text:p>
      <text:p text:style-name="s1"/>
      <text:p text:style-name="s1"><text:span text:style-name="s10">Принят Государственной Думой 9 июля 2004 года</text:span></text:p>
      <text:p text:style-name="s1"><text:span text:style-name="s10">Одобрен Советом Федерации 15 июля 2004 года</text:span></text:p>
      <text:p text:style-name="s9header">ГАРАНТ:</text:p>
      <text:p text:style-name="s9">См. <text:a xlink:type="simple" xlink:href="http://ivo.garant.ru/document/redirect/57467535/0">комментарий</text:a> к настоящему Федеральному закону</text:p>
      <text:p text:style-name="s15"><text:bookmark text:name="anchor1"/><text:span text:style-name="s10">Статья 1.</text:span> Цели и сфера действия настоящего Федерального закона</text:p>
      <text:p text:style-name="s22header">Информация об изменениях:</text:p>
      <text:p text:style-name="s22"><text:bookmark text:name="anchor101"/><text:a xlink:type="simple" xlink:href="http://ivo.garant.ru/document/redirect/70609432/41">Федеральным законом</text:a> от 12 марта 2014 г. N 35-ФЗ часть 1 статьи 1 настоящего Федерального закона изложена в новой редакции, <text:a xlink:type="simple" xlink:href="http://ivo.garant.ru/document/redirect/70609432/71">вступающей в силу</text:a> с 1 октября 2014 г.</text:p>
      <text:p text:style-name="s22"><text:a xlink:type="simple" xlink:href="http://ivo.garant.ru/document/redirect/58056792/101">См. текст части в предыдущей редакции</text:a></text:p>
      <text:p text:style-name="s1">1. Настоящий Федеральный закон регулирует отношения, связанные с установлением, изменением и прекращением режима коммерческой тайны в отношении информации, которая имеет действительную или потенциальную коммерческую ценность в силу неизвестности ее третьим лицам.</text:p>
      <text:p text:style-name="s1"><text:bookmark text:name="anchor102"/>2. Положения настоящего Федерального закона распространяются на <text:a xlink:type="simple" xlink:href="#anchor302">информацию, составляющую коммерческую тайну,</text:a> независимо от вида носителя, на котором она зафиксирована.</text:p>
      <text:p text:style-name="s1"><text:bookmark text:name="anchor103"/>3. Положения настоящего Федерального закона не распространяются на сведения, отнесенные в установленном порядке к государственной тайне, в отношении которой применяются положения законодательства Российской Федерации о <text:a xlink:type="simple" xlink:href="http://ivo.garant.ru/document/redirect/10102673/0">государственной тайне</text:a>.</text:p>
      <text:p text:style-name="s9header">ГАРАНТ:</text:p>
      <text:p text:style-name="s9">См. <text:a xlink:type="simple" xlink:href="http://ivo.garant.ru/document/redirect/57467535/1">комментарии</text:a> к статье 1 настоящего Федерального закона</text:p>
      <text:p text:style-name="s9"/>
      <text:p text:style-name="s15"><text:bookmark text:name="anchor2"/><text:span text:style-name="s10">Статья 2.</text:span> <text:a xlink:type="simple" xlink:href="http://ivo.garant.ru/document/redirect/70609432/42">Утратила силу</text:a> с 1 октября 2014 г.</text:p>
      <text:p text:style-name="s22header">Информация об изменениях:</text:p>
      <text:p text:style-name="s22">См. текст <text:a xlink:type="simple" xlink:href="http://ivo.garant.ru/document/redirect/58056792/2">статьи 2</text:a></text:p>
      <text:p text:style-name="s22"/>
      <text:p text:style-name="s15"><text:bookmark text:name="anchor3"/><text:span text:style-name="s10">Статья 3.</text:span> Основные понятия, используемые в настоящем Федеральном законе</text:p>
      <text:p text:style-name="s1">Для целей настоящего Федерального закона используются следующие основные понятия:</text:p>
      <text:p text:style-name="s22header">Информация об изменениях:</text:p>
      <text:p text:style-name="s22"><text:bookmark text:name="anchor301"/><text:a xlink:type="simple" xlink:href="http://ivo.garant.ru/document/redirect/12151067/3421">Федеральным законом</text:a> от 18 декабря 2006 г. N 231-ФЗ пункт 1 статьи 3 настоящего Федерального закона изложен в новой редакции, <text:a xlink:type="simple" xlink:href="http://ivo.garant.ru/document/redirect/12151067/200">вступающей в силу</text:a> с 1 января 2008 г.</text:p>
      <text:p text:style-name="s22"><text:a xlink:type="simple" xlink:href="http://ivo.garant.ru/document/redirect/5293668/301">См. текст пункта в предыдущей редакции</text:a></text:p>
      <text:p text:style-name="s1">1) <text:span text:style-name="s10">коммерческая тайна</text:span> - режим конфиденциальности информации, позволяющий ее обладателю при существующих или возможных обстоятельствах увеличить доходы, избежать неоправданных расходов, сохранить положение на рынке товаров, работ, услуг или получить иную коммерческую выгоду;</text:p>
      <text:p text:style-name="s22header">Информация об изменениях:</text:p>
      <text:p text:style-name="s22"><text:bookmark text:name="anchor302"/><text:a xlink:type="simple" xlink:href="http://ivo.garant.ru/document/redirect/70609432/43">Федеральным законом</text:a> от 12 марта 2014 г. N 35-ФЗ пункт 2 статьи 3 настоящего Федерального закона изложен в новой редакции, <text:a xlink:type="simple" xlink:href="http://ivo.garant.ru/document/redirect/70609432/71">вступающей в силу</text:a> с 1 октября 2014 г.</text:p>
      <text:p text:style-name="s22"><text:a xlink:type="simple" xlink:href="http://ivo.garant.ru/document/redirect/58056792/302">См. текст пункта в предыдущей редакции</text:a></text:p>
      <text:p text:style-name="s1">2) <text:span text:style-name="s10">информация, составляющая коммерческую тайну,</text:span> - сведения любого характера (производственные, технические, экономические, организационные и другие), в том числе о результатах интеллектуальной деятельности в научно-технической сфере, а также сведения о способах осуществления профессиональной деятельности, которые имеют действительную или потенциальную коммерческую ценность в силу неизвестности их третьим лицам, к которым у третьих лиц нет свободного доступа на законном основании и в отношении которых обладателем таких сведений введен режим коммерческой тайны;</text:p>
      <text:p text:style-name="s1"><text:bookmark text:name="anchor303"/>3) <text:a xlink:type="simple" xlink:href="http://ivo.garant.ru/document/redirect/12151067/3422">утратил силу</text:a> с 1 января 2008 г.;</text:p>
      <text:p text:style-name="s22header">Информация об изменениях:</text:p>
      <text:p text:style-name="s22">См. текст <text:a xlink:type="simple" xlink:href="http://ivo.garant.ru/document/redirect/5293668/303">пункта 3 статьи 3</text:a></text:p>
      <text:p text:style-name="s1"><text:bookmark text:name="anchor304"/>4) <text:span text:style-name="s10">обладатель информации, составляющей коммерческую тайну,</text:span> - лицо, которое владеет информацией, составляющей коммерческую тайну, на законном основании, ограничило доступ к этой информации и установило в отношении ее режим коммерческой тайны;</text:p>
      <text:p text:style-name="s1"><text:bookmark text:name="anchor305"/>5) <text:span text:style-name="s10">доступ к информации, составляющей коммерческую тайну,</text:span> - ознакомление определенных лиц с информацией, составляющей коммерческую тайну, с согласия ее обладателя или на ином законном основании при условии сохранения конфиденциальности этой информации;</text:p>
      <text:p text:style-name="s1"><text:bookmark text:name="anchor306"/>6) <text:span text:style-name="s10">передача информации, составляющей коммерческую тайну,</text:span> - передача информации, составляющей коммерческую тайну и зафиксированной на материальном носителе, ее обладателем контрагенту на основании договора в объеме и на условиях, которые предусмотрены договором, включая условие о принятии контрагентом установленных договором мер по охране ее конфиденциальности;</text:p>
      <text:p text:style-name="s1"><text:bookmark text:name="anchor307"/>7) <text:span text:style-name="s10">контрагент</text:span> - сторона гражданско-правового договора, которой обладатель информации, составляющей коммерческую тайну, передал эту информацию;</text:p>
      <text:p text:style-name="s1"><text:bookmark text:name="anchor308"/>8) <text:span text:style-name="s10">предоставление информации, составляющей коммерческую тайну,</text:span> - передача информации, составляющей коммерческую тайну и зафиксированной на материальном носителе, ее обладателем органам государственной власти, иным государственным органам, органам местного самоуправления в целях выполнения их функций;</text:p>
      <text:p text:style-name="s1"><text:bookmark text:name="anchor309"/>9) <text:span text:style-name="s10">разглашение информации, составляющей коммерческую тайну,</text:span> - действие или бездействие, в результате которых информация, составляющая коммерческую тайну, в любой возможной форме (устной, письменной, иной форме, в том числе с использованием технических средств) становится известной третьим лицам без согласия обладателя такой информации либо вопреки трудовому или гражданско-правовому договору.</text:p>
      <text:p text:style-name="s9header">ГАРАНТ:</text:p>
      <text:p text:style-name="s9">См. <text:a xlink:type="simple" xlink:href="http://ivo.garant.ru/document/redirect/57467535/3">комментарии</text:a> к статье 3 настоящего Федерального закона</text:p>
      <text:p text:style-name="s9"/>
      <text:p text:style-name="s15"><text:bookmark text:name="anchor4"/><text:span text:style-name="s10">Статья 4.</text:span> Право на отнесение информации к информации, составляющей коммерческую тайну, и способы получения такой информации</text:p>
      <text:p text:style-name="s1"><text:bookmark text:name="anchor401"/><text:a xlink:type="simple" xlink:href="http://ivo.garant.ru/document/redirect/12185519/0">1</text:a>. Право на отнесение информации к <text:a xlink:type="simple" xlink:href="#anchor302">информации, составляющей коммерческую тайну,</text:a> и на определение перечня и состава такой информации принадлежит обладателю такой информации с учетом положений настоящего Федерального закона.</text:p>
      <text:p text:style-name="s1"><text:bookmark text:name="anchor402"/>2. <text:a xlink:type="simple" xlink:href="http://ivo.garant.ru/document/redirect/12151067/343">Утратила силу</text:a> с 1 января 2008 г.</text:p>
      <text:p text:style-name="s22header">Информация об изменениях:</text:p>
      <text:p text:style-name="s22">См. текст <text:a xlink:type="simple" xlink:href="http://ivo.garant.ru/document/redirect/5293668/402">части 2 статьи 4</text:a></text:p>
      <text:p text:style-name="s1"><text:bookmark text:name="anchor403"/>3. Информация, составляющая коммерческую тайну, полученная от ее обладателя на основании договора или другом законном основании, считается полученной законным способом.</text:p>
      <text:p text:style-name="s1"><text:bookmark text:name="anchor404"/>4. Информация, составляющая коммерческую тайну, обладателем которой является другое лицо, считается полученной незаконно, если ее получение осуществлялось с умышленным преодолением принятых <text:a xlink:type="simple" xlink:href="#anchor304">обладателем информации, составляющей коммерческую тайну,</text:a> мер по охране конфиденциальности этой информации, а также если получающее эту информацию лицо знало или имело достаточные основания полагать, что эта информация составляет <text:a xlink:type="simple" xlink:href="#anchor301">коммерческую тайну</text:a>, обладателем которой является другое лицо, и что осуществляющее передачу этой информации лицо не имеет на передачу этой информации законного основания.</text:p>
      <text:p text:style-name="s9header">ГАРАНТ:</text:p>
      <text:p text:style-name="s9">См. <text:a xlink:type="simple" xlink:href="http://ivo.garant.ru/document/redirect/57467535/4">комментарии</text:a> к статье 4 настоящего Федерального закона</text:p>
      <text:p text:style-name="s9"/>
      <text:p text:style-name="s15"><text:bookmark text:name="anchor5"/><text:span text:style-name="s10">Статья 5.</text:span> Сведения, которые не могут составлять коммерческую тайну</text:p>
      <text:p text:style-name="s1">Режим коммерческой тайны не может быть установлен лицами, осуществляющими предпринимательскую деятельность, в отношении следующих сведений:</text:p>
      <text:p text:style-name="s22header">Информация об изменениях:</text:p>
      <text:p text:style-name="s22"><text:bookmark text:name="anchor501"/>Пункт 1 изменен с 8 августа 2024 г. - <text:a xlink:type="simple" xlink:href="http://ivo.garant.ru/document/redirect/409493467/61">Федеральный закон</text:a> от 8 августа 2024 г. N 251-ФЗ</text:p>
      <text:p text:style-name="s22"><text:a xlink:type="simple" xlink:href="http://ivo.garant.ru/document/redirect/76840337/501">См. предыдущую редакцию</text:a></text:p>
      <text:p text:style-name="s1">1) содержащихся в учредительных документах юридического лица, за исключением учредительных документов личного фонда или международного личного фонда, документах, подтверждающих факт внесения записей о юридических лицах и об индивидуальных предпринимателях в соответствующие государственные реестры;</text:p>
      <text:p text:style-name="s1"><text:bookmark text:name="anchor502"/>2) содержащихся в документах, дающих право на осуществление предпринимательской деятельности;</text:p>
      <text:p text:style-name="s1"><text:bookmark text:name="anchor503"/>3) о составе имущества государственного или муниципального унитарного предприятия, государственного учреждения и об использовании ими средств соответствующих бюджетов;</text:p>
      <text:p text:style-name="s22header">Информация об изменениях:</text:p>
      <text:p text:style-name="s22"><text:bookmark text:name="anchor504"/>Пункт 4 изменен с 20 марта 2021 г. - <text:a xlink:type="simple" xlink:href="http://ivo.garant.ru/document/redirect/400419898/31">Федеральный закон</text:a> от 9 марта 2021 г. N 39-ФЗ</text:p>
      <text:p text:style-name="s22"><text:a xlink:type="simple" xlink:href="http://ivo.garant.ru/document/redirect/77708609/504">См. предыдущую редакцию</text:a></text:p>
      <text:p text:style-name="s1">4) о состоянии противопожарной безопасности, санитарно-эпидемиологической и радиационной обстановке, безопасности пищевых продуктов и других факторах, оказывающих негативное воздействие на обеспечение безопасного функционирования производственных объектов, безопасности каждого гражданина и безопасности населения в целом;</text:p>
      <text:p text:style-name="s1"><text:bookmark text:name="anchor505"/>5) о численности, о составе работников, о системе оплаты труда, об условиях труда, в том числе об охране труда, о показателях производственного травматизма и профессиональной заболеваемости, и о наличии свободных рабочих мест;</text:p>
      <text:p text:style-name="s22header">Информация об изменениях:</text:p>
      <text:p text:style-name="s22"><text:bookmark text:name="anchor506"/>Пункт 6 изменен с 29 апреля 2018 г. - <text:a xlink:type="simple" xlink:href="http://ivo.garant.ru/document/redirect/71926044/0">Федеральный закон</text:a> от 18 апреля 2018 г. N 86-ФЗ</text:p>
      <text:p text:style-name="s22"><text:a xlink:type="simple" xlink:href="http://ivo.garant.ru/document/redirect/77666079/506">См. предыдущую редакцию</text:a></text:p>
      <text:p text:style-name="s1">6) о задолженности работодателей по выплате заработной платы и социальным выплатам;</text:p>
      <text:p text:style-name="s1"><text:bookmark text:name="anchor507"/>7) о нарушениях законодательства Российской Федерации и фактах привлечения к ответственности за совершение этих нарушений;</text:p>
      <text:p text:style-name="s1"><text:bookmark text:name="anchor508"/>8) об условиях конкурсов или аукционов по приватизации объектов государственной или муниципальной собственности;</text:p>
      <text:p text:style-name="s22header">Информация об изменениях:</text:p>
      <text:p text:style-name="s22"><text:bookmark text:name="anchor509"/>Пункт 9 изменен с 8 августа 2024 г. - <text:a xlink:type="simple" xlink:href="http://ivo.garant.ru/document/redirect/409493467/62">Федеральный закон</text:a> от 8 августа 2024 г. N 251-ФЗ</text:p>
      <text:p text:style-name="s22"><text:a xlink:type="simple" xlink:href="http://ivo.garant.ru/document/redirect/76840337/509">См. предыдущую редакцию</text:a></text:p>
      <text:p text:style-name="s1">9) о размерах и структуре доходов некоммерческих организаций, за исключением личного фонда, в том числе международного личного фонда, о размерах и составе их имущества, об их расходах, о численности и об оплате труда их работников, об использовании безвозмездного труда граждан в деятельности некоммерческой организации, за исключением личного фонда, в том числе международного личного фонда;</text:p>
      <text:p text:style-name="s1"><text:bookmark text:name="anchor5010"/>10) о перечне лиц, имеющих право действовать без доверенности от имени юридического лица;</text:p>
      <text:p text:style-name="s1"><text:bookmark text:name="anchor5011"/>11) обязательность раскрытия которых или недопустимость ограничения доступа к которым установлена иными <text:span text:style-name="s8">федеральными законами</text:span>;</text:p>
      <text:p text:style-name="s22header">Информация об изменениях:</text:p>
      <text:p text:style-name="s22"><text:bookmark text:name="anchor5012"/>Статья 5 дополнена пунктом 12 с 20 марта 2021 г. - <text:a xlink:type="simple" xlink:href="http://ivo.garant.ru/document/redirect/400419898/32">Федеральный закон</text:a> от 9 марта 2021 г. N 39-ФЗ</text:p>
      <text:p text:style-name="s1">12) составляющих <text:a xlink:type="simple" xlink:href="http://ivo.garant.ru/document/redirect/12125350/1057">информацию</text:a> о состоянии окружающей среды (экологическую информацию).</text:p>
      <text:p text:style-name="s9header">ГАРАНТ:</text:p>
      <text:p text:style-name="s9">См. <text:a xlink:type="simple" xlink:href="http://ivo.garant.ru/document/redirect/57467535/5">комментарии</text:a> к статье 5 настоящего Федерального закона</text:p>
      <text:p text:style-name="s9"/>
      <text:p text:style-name="s15"><text:bookmark text:name="anchor6"/><text:span text:style-name="s10">Статья 6.</text:span> Предоставление информации, составляющей коммерческую тайну</text:p>
      <text:p text:style-name="s1"><text:bookmark text:name="anchor601"/>1. <text:a xlink:type="simple" xlink:href="#anchor304">Обладатель информации, составляющей коммерческую тайну</text:a>, по мотивированному требованию органа государственной власти, иного государственного органа, органа местного самоуправления предоставляет им на безвозмездной основе информацию, составляющую коммерческую тайну. Мотивированное требование должно быть подписано уполномоченным должностным лицом, содержать указание цели и правового основания затребования информации, составляющей коммерческую тайну, и срок <text:a xlink:type="simple" xlink:href="#anchor308">предоставления</text:a> этой информации, если иное не установлено федеральными законами.</text:p>
      <text:p text:style-name="s1"><text:bookmark text:name="anchor602"/>2. В случае отказа обладателя информации, составляющей коммерческую тайну, предоставить ее органу государственной власти, иному государственному органу, органу местного самоуправления данные органы вправе затребовать эту информацию в судебном порядке.</text:p>
      <text:p text:style-name="s22header">Информация об изменениях:</text:p>
      <text:p text:style-name="s22"><text:bookmark text:name="anchor603"/><text:a xlink:type="simple" xlink:href="http://ivo.garant.ru/document/redirect/12154855/27">Федеральным законом</text:a> от 24 июля 2007 г. N 214-ФЗ в часть третью статьи 6 настоящего Федерального закона внесены изменения, <text:a xlink:type="simple" xlink:href="http://ivo.garant.ru/document/redirect/12154855/3201">вступающие в силу</text:a> с 7 сентября 2007 г.</text:p>
      <text:p text:style-name="s22"><text:a xlink:type="simple" xlink:href="http://ivo.garant.ru/document/redirect/5227853/603">См. текст части в предыдущей редакции</text:a></text:p>
      <text:p text:style-name="s1">3. Обладатель информации, составляющей коммерческую тайну, а также органы государственной власти, иные государственные органы, органы местного самоуправления, получившие такую информацию в соответствии с <text:a xlink:type="simple" xlink:href="#anchor601">частью 1</text:a> настоящей статьи, обязаны предоставить эту информацию по запросу судов, органов предварительного следствия, органов дознания по делам, находящимся в их производстве, в порядке и на основаниях, которые предусмотрены законодательством Российской Федерации.</text:p>
      <text:p text:style-name="s22header">Информация об изменениях:</text:p>
      <text:p text:style-name="s22"><text:bookmark text:name="anchor6031"/>Статья 6 дополнена частью 3.1 с 25 июля 2022 г. - <text:a xlink:type="simple" xlink:href="http://ivo.garant.ru/document/redirect/404993979/11">Федеральный закон</text:a> от 14 июля 2022 г. N 311-ФЗ</text:p>
      <text:p text:style-name="s1">3.1. Федеральные органы исполнительной власти, получившие в рамках установленных полномочий информацию, составляющую коммерческую тайну, от обладателя такой информации, предоставляют такую информацию по запросу федеральных органов исполнительной власти в рамках межведомственного информационного взаимодействия с соблюдением требований и (или) ограничений, установленных настоящим Федеральным законом, в случаях, предусмотренных <text:a xlink:type="simple" xlink:href="http://ivo.garant.ru/document/redirect/12174909/45021">федеральными законами</text:a>, с одновременным направлением обладателю такой информации любым доступным способом, в том числе посредством электронного документа, подписанного усиленной квалифицированной <text:a xlink:type="simple" xlink:href="http://ivo.garant.ru/document/redirect/12184522/21">электронной подписью</text:a> и направленного на адрес электронной почты обладателя такой информации, уведомления о ее предоставлении с указанием объема предоставленной информации.</text:p>
      <text:p text:style-name="s22header">Информация об изменениях:</text:p>
      <text:p text:style-name="s22"><text:bookmark text:name="anchor604"/>Часть 4 изменена с 25 июля 2022 г. - <text:a xlink:type="simple" xlink:href="http://ivo.garant.ru/document/redirect/404993979/12">Федеральный закон</text:a> от 14 июля 2022 г. N 311-ФЗ</text:p>
      <text:p text:style-name="s22"><text:a xlink:type="simple" xlink:href="http://ivo.garant.ru/document/redirect/76805309/604">См. предыдущую редакцию</text:a></text:p>
      <text:p text:style-name="s1">4. На документах, предоставляемых указанным в <text:a xlink:type="simple" xlink:href="#anchor601">частях 1</text:a>, <text:a xlink:type="simple" xlink:href="#anchor603">3</text:a> и <text:a xlink:type="simple" xlink:href="#anchor6031">3.1</text:a> настоящей статьи органам и содержащих <text:a xlink:type="simple" xlink:href="#anchor302">информацию, составляющую коммерческую тайну,</text:a> должен быть нанесен гриф "Коммерческая тайна" с указанием ее обладателя (для юридических лиц - полное наименование и место нахождения, для индивидуальных предпринимателей - фамилия, имя, отчество гражданина, являющегося индивидуальным предпринимателем, и место жительства).</text:p>
      <text:p text:style-name="s9header">ГАРАНТ:</text:p>
      <text:p text:style-name="s9">См. <text:a xlink:type="simple" xlink:href="http://ivo.garant.ru/document/redirect/57467535/6">комментарии</text:a> к статье 6 настоящего Федерального закона</text:p>
      <text:p text:style-name="s9"/>
      <text:p text:style-name="s22header">Информация об изменениях:</text:p>
      <text:p text:style-name="s22"><text:bookmark text:name="anchor61"/><text:a xlink:type="simple" xlink:href="http://ivo.garant.ru/document/redirect/70609432/44">Федеральным законом</text:a> от 12 марта 2014 г. N 35-ФЗ настоящий Федеральный закон дополнен статьей 6.1, <text:a xlink:type="simple" xlink:href="http://ivo.garant.ru/document/redirect/70609432/71">вступающей в силу</text:a> с 1 октября 2014 г.</text:p>
      <text:p text:style-name="s15"><text:span text:style-name="s10">Статья 6.1.</text:span> Права обладателя информации, составляющей коммерческую тайну</text:p>
      <text:p text:style-name="s1"><text:bookmark text:name="anchor611"/>1. Права обладателя информации, составляющей коммерческую тайну, возникают с момента установления им в отношении этой информации режима коммерческой тайны в соответствии со <text:a xlink:type="simple" xlink:href="#anchor10">статьей 10</text:a> настоящего Федерального закона.</text:p>
      <text:p text:style-name="s1"><text:bookmark text:name="anchor612"/>2. Обладатель информации, составляющей коммерческую тайну, имеет право:</text:p>
      <text:p text:style-name="s1"><text:bookmark text:name="anchor6121"/>1) устанавливать, изменять, отменять в письменной форме режим коммерческой тайны в соответствии с настоящим Федеральным законом и гражданско-правовым договором;</text:p>
      <text:p text:style-name="s1"><text:bookmark text:name="anchor6122"/>2) использовать информацию, составляющую коммерческую тайну, для собственных нужд в порядке, не противоречащем законодательству Российской Федерации;</text:p>
      <text:p text:style-name="s1"><text:bookmark text:name="anchor6123"/>3) разрешать или запрещать доступ к информации, составляющей коммерческую тайну, определять порядок и условия доступа к этой информации;</text:p>
      <text:p text:style-name="s1"><text:bookmark text:name="anchor6124"/>4) требовать от юридических лиц, физических лиц, получивших доступ к информации, составляющей коммерческую тайну, органов государственной власти, иных государственных органов, органов местного самоуправления, которым предоставлена информация, составляющая коммерческую тайну, соблюдения обязанностей по охране ее конфиденциальности;</text:p>
      <text:p text:style-name="s1"><text:bookmark text:name="anchor6125"/>5) требовать от лиц, получивших доступ к информации, составляющей коммерческую тайну, в результате действий, совершенных случайно или по ошибке, охраны конфиденциальности этой информации;</text:p>
      <text:p text:style-name="s1"><text:bookmark text:name="anchor6126"/>6) защищать в установленном законом порядке свои права в случае разглашения, незаконного получения или незаконного использования третьими лицами информации, составляющей коммерческую тайну, в том числе требовать возмещения убытков, причиненных в связи с нарушением его прав.</text:p>
      <text:p text:style-name="s9header">ГАРАНТ:</text:p>
      <text:p text:style-name="s9">См. <text:a xlink:type="simple" xlink:href="http://ivo.garant.ru/document/redirect/57467535/61">комментарии</text:a> к статье 6.1 настоящего Федерального закона</text:p>
      <text:p text:style-name="s9"/>
      <text:p text:style-name="s15"><text:bookmark text:name="anchor7"/><text:span text:style-name="s10">Статья 7.</text:span> <text:a xlink:type="simple" xlink:href="http://ivo.garant.ru/document/redirect/12151067/344">Утратила силу</text:a> с 1 января 2008 г.</text:p>
      <text:p text:style-name="s22header">Информация об изменениях:</text:p>
      <text:p text:style-name="s22">См. текст <text:a xlink:type="simple" xlink:href="http://ivo.garant.ru/document/redirect/5293668/7">статьи 7</text:a></text:p>
      <text:p text:style-name="s22"/>
      <text:p text:style-name="s15"><text:bookmark text:name="anchor8"/><text:span text:style-name="s10">Статья 8.</text:span> <text:a xlink:type="simple" xlink:href="http://ivo.garant.ru/document/redirect/12151067/344">Утратила силу</text:a> с 1 января 2008 г.</text:p>
      <text:p text:style-name="s22header">Информация об изменениях:</text:p>
      <text:p text:style-name="s22">См. текст <text:a xlink:type="simple" xlink:href="http://ivo.garant.ru/document/redirect/5293668/8">статьи 8</text:a></text:p>
      <text:p text:style-name="s22"/>
      <text:p text:style-name="s15"><text:bookmark text:name="anchor9"/><text:span text:style-name="s10">Статья 9.</text:span> <text:a xlink:type="simple" xlink:href="http://ivo.garant.ru/document/redirect/12151067/344">Утратила силу</text:a> с 1 января 2008 г.</text:p>
      <text:p text:style-name="s22header">Информация об изменениях:</text:p>
      <text:p text:style-name="s22">См. текст <text:a xlink:type="simple" xlink:href="http://ivo.garant.ru/document/redirect/5293668/9">статьи 9</text:a></text:p>
      <text:p text:style-name="s22"/>
      <text:p text:style-name="s15"><text:bookmark text:name="anchor10"/><text:span text:style-name="s10">Статья 10.</text:span> Охрана конфиденциальности информации</text:p>
      <text:p text:style-name="s1"><text:bookmark text:name="anchor1001"/>1. Меры по охране конфиденциальности информации, принимаемые ее обладателем, должны включать в себя:</text:p>
      <text:p text:style-name="s1"><text:bookmark text:name="anchor10011"/>1) определение перечня <text:a xlink:type="simple" xlink:href="#anchor302">информации, составляющей коммерческую тайну</text:a>;</text:p>
      <text:p text:style-name="s1"><text:bookmark text:name="anchor10012"/>2) ограничение доступа к информации, составляющей коммерческую тайну, путем установления порядка обращения с этой информацией и контроля за соблюдением такого порядка;</text:p>
      <text:p text:style-name="s1"><text:bookmark text:name="anchor10013"/>3) учет лиц, получивших <text:a xlink:type="simple" xlink:href="#anchor305">доступ к информации, составляющей коммерческую тайну,</text:a> и (или) лиц, которым такая информация была предоставлена или передана;</text:p>
      <text:p text:style-name="s1"><text:bookmark text:name="anchor10014"/>4) регулирование отношений по использованию информации, составляющей коммерческую тайну, работниками на основании трудовых договоров и <text:a xlink:type="simple" xlink:href="#anchor307">контрагентами</text:a> на основании гражданско-правовых договоров;</text:p>
      <text:p text:style-name="s22header">Информация об изменениях:</text:p>
      <text:p text:style-name="s22"><text:bookmark text:name="anchor10015"/><text:a xlink:type="simple" xlink:href="http://ivo.garant.ru/document/redirect/12187858/2901">Федеральным законом</text:a> от 11 июля 2011 г. N 200-ФЗ пункт 5 части 1 статьи 10 настоящего Федерального закона изложен в новой редакции</text:p>
      <text:p text:style-name="s22"><text:a xlink:type="simple" xlink:href="http://ivo.garant.ru/document/redirect/5759437/10015">См. текст пункта в предыдущей редакции</text:a></text:p>
      <text:p text:style-name="s1">5) нанесение на материальные носители, содержащие информацию, составляющую коммерческую тайну, или включение в состав реквизитов документов, содержащих такую информацию, грифа "Коммерческая тайна" с указанием обладателя такой информации (для юридических лиц - полное наименование и место нахождения, для индивидуальных предпринимателей - фамилия, имя, отчество гражданина, являющегося индивидуальным предпринимателем, и место жительства).</text:p>
      <text:p text:style-name="s1"><text:bookmark text:name="anchor1002"/>2. Режим коммерческой тайны считается установленным после принятия обладателем информации, составляющей коммерческую тайну, мер, указанных в <text:a xlink:type="simple" xlink:href="#anchor1001">части 1</text:a> настоящей статьи.</text:p>
      <text:p text:style-name="s1"><text:bookmark text:name="anchor1003"/>3. Индивидуальный предприниматель, являющийся <text:a xlink:type="simple" xlink:href="#anchor304">обладателем информации, составляющей коммерческую тайну,</text:a> и не имеющий работников, с которыми заключены трудовые договоры, принимает меры по охране конфиденциальности информации, указанные в <text:a xlink:type="simple" xlink:href="#anchor1001">части 1</text:a> настоящей статьи, за исключением <text:a xlink:type="simple" xlink:href="#anchor10011">пунктов 1</text:a> и <text:a xlink:type="simple" xlink:href="#anchor10012">2</text:a>, а также положений <text:a xlink:type="simple" xlink:href="#anchor10014">пункта 4</text:a>, касающихся регулирования трудовых отношений.</text:p>
      <text:p text:style-name="s1"><text:bookmark text:name="anchor1004"/>4. Наряду с мерами, указанными в <text:a xlink:type="simple" xlink:href="#anchor1001">части 1</text:a> настоящей статьи, обладатель информации, составляющей коммерческую тайну, вправе применять при необходимости средства и методы технической защиты конфиденциальности этой информации, другие не противоречащие законодательству Российской Федерации меры.</text:p>
      <text:p text:style-name="s1"><text:bookmark text:name="anchor1005"/>5. Меры по охране конфиденциальности информации признаются разумно достаточными, если:</text:p>
      <text:p text:style-name="s1"><text:bookmark text:name="anchor10051"/>1) исключается доступ к информации, составляющей коммерческую тайну, любых лиц без согласия ее обладателя;</text:p>
      <text:p text:style-name="s1"><text:bookmark text:name="anchor10052"/>2) обеспечивается возможность использования информации, составляющей коммерческую тайну, работниками и передачи ее контрагентам без нарушения режима коммерческой тайны.</text:p>
      <text:p text:style-name="s1"><text:bookmark text:name="anchor1006"/>6. Режим коммерческой тайны не может быть использован в целях, противоречащих требованиям защиты основ конституционного строя, нравственности, здоровья, прав и законных интересов других лиц, обеспечения обороны страны и безопасности государства.</text:p>
      <text:p text:style-name="s9header">ГАРАНТ:</text:p>
      <text:p text:style-name="s9">См. <text:a xlink:type="simple" xlink:href="http://ivo.garant.ru/document/redirect/57467535/10">комментарии</text:a> к статье 10 настоящего Федерального закона</text:p>
      <text:p text:style-name="s9"/>
      <text:p text:style-name="s22header">Информация об изменениях:</text:p>
      <text:p text:style-name="s22"><text:bookmark text:name="anchor11"/><text:a xlink:type="simple" xlink:href="http://ivo.garant.ru/document/redirect/70609432/45">Федеральным законом</text:a> от 12 марта 2014 г. N 35-ФЗ статья 11 настоящего Федерального закона изложена в новой редакции, <text:a xlink:type="simple" xlink:href="http://ivo.garant.ru/document/redirect/70609432/71">вступающей в силу</text:a> с 1 октября 2014 г.</text:p>
      <text:p text:style-name="s22"><text:a xlink:type="simple" xlink:href="http://ivo.garant.ru/document/redirect/58056792/11">См. текст статьи в предыдущей редакции</text:a></text:p>
      <text:p text:style-name="s15"><text:span text:style-name="s10">Статья 11.</text:span> Охрана конфиденциальности информации, составляющей коммерческую тайну, в рамках трудовых отношений</text:p>
      <text:p text:style-name="s1"><text:bookmark text:name="anchor1101"/>1. В целях охраны конфиденциальности информации, составляющей коммерческую тайну, работодатель обязан:</text:p>
      <text:p text:style-name="s1"><text:bookmark text:name="anchor11011"/>1) ознакомить под расписку работника, доступ которого к этой информации, обладателями которой являются работодатель и его контрагенты, необходим для исполнения данным работником своих трудовых обязанностей, с перечнем информации, составляющей коммерческую тайну;</text:p>
      <text:p text:style-name="s1"><text:bookmark text:name="anchor11012"/>2) ознакомить под расписку работника с установленным работодателем режимом коммерческой тайны и с мерами ответственности за его нарушение;</text:p>
      <text:p text:style-name="s1"><text:bookmark text:name="anchor11013"/>3) создать работнику необходимые условия для соблюдения им установленного работодателем режима коммерческой тайны.</text:p>
      <text:p text:style-name="s1"><text:bookmark text:name="anchor1102"/>2. Доступ работника к информации, составляющей коммерческую тайну, осуществляется с его согласия, если это не предусмотрено его трудовыми обязанностями.</text:p>
      <text:p text:style-name="s1"><text:bookmark text:name="anchor1103"/>3. В целях охраны конфиденциальности информации, составляющей коммерческую тайну, работник обязан:</text:p>
      <text:p text:style-name="s1"><text:bookmark text:name="anchor11031"/>1) выполнять установленный работодателем режим коммерческой тайны;</text:p>
      <text:p text:style-name="s1"><text:bookmark text:name="anchor11032"/>2) не разглашать эту информацию, обладателями которой являются работодатель и его контрагенты, и без их согласия не использовать эту информацию в личных целях в течение всего срока действия режима коммерческой тайны, в том числе после прекращения действия трудового договора;</text:p>
      <text:p text:style-name="s1"><text:bookmark text:name="anchor11033"/>3) возместить причиненные работодателю убытки, если работник виновен в разглашении информации, составляющей коммерческую тайну и ставшей ему известной в связи с исполнением им трудовых обязанностей;</text:p>
      <text:p text:style-name="s1"><text:bookmark text:name="anchor11034"/>4) передать работодателю при прекращении или расторжении трудового договора материальные носители информации, имеющиеся в пользовании работника и содержащие информацию, составляющую коммерческую тайну.</text:p>
      <text:p text:style-name="s1"><text:bookmark text:name="anchor1104"/>4. Работодатель вправе потребовать возмещения убытков, причиненных ему разглашением информации, составляющей коммерческую тайну, от лица, получившего доступ к этой информации в связи с исполнением трудовых обязанностей, но прекратившего трудовые отношения с работодателем, если эта информация разглашена в течение срока действия режима коммерческой тайны.</text:p>
      <text:p text:style-name="s1"><text:bookmark text:name="anchor1105"/>5. Причиненные работником или прекратившим трудовые отношения с работодателем лицом убытки не возмещаются, если разглашение информации, составляющей коммерческую тайну, произошло вследствие несоблюдения работодателем мер по обеспечению режима коммерческой тайны, действий третьих лиц или непреодолимой силы.</text:p>
      <text:p text:style-name="s1"><text:bookmark text:name="anchor1106"/>6. Трудовым договором с руководителем организации должны предусматриваться его обязанности по обеспечению охраны конфиденциальности составляющей коммерческую тайну информации, обладателем которой являются организация и ее контрагенты, и ответственность за обеспечение охраны конфиденциальности этой информации.</text:p>
      <text:p text:style-name="s1"><text:bookmark text:name="anchor1107"/>7. Руководитель организации возмещает организации убытки, причиненные его виновными действиями в связи с нарушением законодательства Российской Федерации о коммерческой тайне. При этом убытки определяются в соответствии с гражданским законодательством.</text:p>
      <text:p text:style-name="s1"><text:bookmark text:name="anchor1108"/>8. Работник имеет право обжаловать в судебном порядке незаконное установление режима коммерческой тайны в отношении информации, к которой он получил доступ в связи с исполнением трудовых обязанностей.</text:p>
      <text:p text:style-name="s9header">ГАРАНТ:</text:p>
      <text:p text:style-name="s9">См. <text:a xlink:type="simple" xlink:href="http://ivo.garant.ru/document/redirect/57467535/11">комментарии</text:a> к статье 11 настоящего Федерального закона</text:p>
      <text:p text:style-name="s9"/>
      <text:p text:style-name="s15"><text:bookmark text:name="anchor12"/><text:span text:style-name="s10">Статья 12.</text:span> <text:a xlink:type="simple" xlink:href="http://ivo.garant.ru/document/redirect/12151067/346">Утратила силу</text:a> с 1 января 2008 г.</text:p>
      <text:p text:style-name="s22header">Информация об изменениях:</text:p>
      <text:p text:style-name="s22">См. текст <text:a xlink:type="simple" xlink:href="http://ivo.garant.ru/document/redirect/5293668/12">статьи 12</text:a></text:p>
      <text:p text:style-name="s22"/>
      <text:p text:style-name="s15"><text:bookmark text:name="anchor13"/><text:span text:style-name="s10">Статья 13.</text:span> Охрана конфиденциальности информации при ее предоставлении</text:p>
      <text:p text:style-name="s1"><text:bookmark text:name="anchor1301"/>1. Органы государственной власти, иные государственные органы, органы местного самоуправления в соответствии с настоящим Федеральным законом и иными федеральными законами обязаны создать условия, обеспечивающие охрану конфиденциальности информации, <text:a xlink:type="simple" xlink:href="#anchor308">предоставленной</text:a> им юридическими лицами или индивидуальными предпринимателями.</text:p>
      <text:p text:style-name="s1"><text:bookmark text:name="anchor1302"/>2. Должностные лица органов государственной власти, иных государственных органов, органов местного самоуправления, государственные или муниципальные служащие указанных органов без согласия обладателя информации, составляющей коммерческую тайну, не вправе разглашать или передавать другим лицам, органам государственной власти, иным государственным органам, органам местного самоуправления ставшую известной им в силу выполнения должностных (служебных) обязанностей информацию, составляющую коммерческую тайну, за исключением случаев, предусмотренных настоящим Федеральным законом, а также не вправе использовать эту информацию в корыстных или иных личных целях.</text:p>
      <text:p text:style-name="s1"><text:bookmark text:name="anchor1303"/>3. В случае нарушения конфиденциальности информации должностными лицами органов государственной власти, иных государственных органов, органов местного самоуправления, государственными и муниципальными служащими указанных органов эти лица несут ответственность в соответствии с законодательством Российской Федерации.</text:p>
      <text:p text:style-name="s9header">ГАРАНТ:</text:p>
      <text:p text:style-name="s9">См. <text:a xlink:type="simple" xlink:href="http://ivo.garant.ru/document/redirect/57467535/13">комментарии</text:a> к статье 13 настоящего Федерального закона</text:p>
      <text:p text:style-name="s9"/>
      <text:p text:style-name="s15"><text:bookmark text:name="anchor14"/><text:span text:style-name="s10">Статья 14.</text:span> Ответственность за нарушение настоящего Федерального закона</text:p>
      <text:p text:style-name="s1"><text:bookmark text:name="anchor1401"/>1. Нарушение настоящего Федерального закона влечет за собой <text:a xlink:type="simple" xlink:href="http://ivo.garant.ru/document/redirect/12125268/192">дисциплинарную</text:a>, гражданско-правовую, <text:a xlink:type="simple" xlink:href="http://ivo.garant.ru/document/redirect/12125267/1314">административную</text:a> или <text:a xlink:type="simple" xlink:href="http://ivo.garant.ru/document/redirect/10108000/183">уголовную ответственность</text:a> в соответствии с законодательством Российской Федерации.</text:p>
      <text:p text:style-name="s1"><text:bookmark text:name="anchor1402"/>2. Работник, который в связи с исполнением трудовых обязанностей, получил <text:a xlink:type="simple" xlink:href="#anchor305">доступ к информации, составляющей коммерческую тайну,</text:a> обладателями которой являются работодатель и его <text:a xlink:type="simple" xlink:href="#anchor307">контрагенты</text:a>, в случае умышленного или неосторожного разглашения этой информации при отсутствии в действиях такого работника состава преступления несет <text:a xlink:type="simple" xlink:href="http://ivo.garant.ru/document/redirect/12125268/192">дисциплинарную ответственность</text:a> в соответствии с законодательством Российской Федерации.</text:p>
      <text:p text:style-name="s1"><text:bookmark text:name="anchor1403"/>3. Органы государственной власти, иные государственные органы, органы местного самоуправления, получившие доступ к информации, составляющей коммерческую тайну, несут перед <text:a xlink:type="simple" xlink:href="#anchor304">обладателем информации, составляющей коммерческую тайну,</text:a> гражданско-правовую ответственность за разглашение или незаконное использование этой информации их должностными лицами, государственными или муниципальными служащими указанных органов, которым она стала известна в связи с выполнением ими должностных (служебных) обязанностей.</text:p>
      <text:p text:style-name="s1"><text:bookmark text:name="anchor1404"/>4. Лицо, которое использовало информацию, составляющую коммерческую тайну, и не имело достаточных оснований считать использование данной информации незаконным, в том числе получило доступ к ней в результате случайности или ошибки, не может в соответствии с настоящим Федеральным законом быть привлечено к ответственности.</text:p>
      <text:p text:style-name="s1"><text:bookmark text:name="anchor1405"/>5. По требованию обладателя информации, составляющей коммерческую тайну, лицо, указанное в <text:a xlink:type="simple" xlink:href="#anchor1404">части 4</text:a> настоящей статьи, обязано принять меры по охране конфиденциальности информации. При отказе такого лица принять указанные меры обладатель информации, составляющей коммерческую тайну, вправе требовать в судебном порядке защиты своих прав.</text:p>
      <text:p text:style-name="s9header">ГАРАНТ:</text:p>
      <text:p text:style-name="s9">См. <text:a xlink:type="simple" xlink:href="http://ivo.garant.ru/document/redirect/57467535/14">комментарии</text:a> к статье 14 настоящего Федерального закона</text:p>
      <text:p text:style-name="s9"/>
      <text:p text:style-name="s15"><text:bookmark text:name="anchor15"/><text:span text:style-name="s10">Статья 15.</text:span> Ответственность за непредоставление органам государственной власти, иным государственным органам, органам местного самоуправления информации, составляющей коммерческую тайну</text:p>
      <text:p text:style-name="s1">Невыполнение <text:a xlink:type="simple" xlink:href="#anchor304">обладателем информации, составляющей коммерческую тайну</text:a>, законных требований органов государственной власти, иных государственных органов, органов местного самоуправления о предоставлении им информации, составляющей коммерческую тайну, а равно воспрепятствование получению должностными лицами этих органов указанной информации влечет за собой ответственность в соответствии с законодательством Российской Федерации.</text:p>
      <text:p text:style-name="s9header">ГАРАНТ:</text:p>
      <text:p text:style-name="s9">См. <text:a xlink:type="simple" xlink:href="http://ivo.garant.ru/document/redirect/57467535/15">комментарии</text:a> к статье 15 настоящего Федерального закона</text:p>
      <text:p text:style-name="s9"/>
      <text:p text:style-name="s15"><text:bookmark text:name="anchor16"/><text:span text:style-name="s10">Статья 16.</text:span> Переходные положения</text:p>
      <text:p text:style-name="s1">Грифы, нанесенные до вступления в силу настоящего Федерального закона на материальные носители и указывающие на содержание в них <text:a xlink:type="simple" xlink:href="#anchor302">информации, составляющей коммерческую тайну</text:a>, сохраняют свое действие при условии, если меры по охране конфиденциальности указанной информации будут приведены в соответствие с требованиями настоящего Федерального закона.</text:p>
      <text:p text:style-name="s9header">ГАРАНТ:</text:p>
      <text:p text:style-name="s9">См. <text:a xlink:type="simple" xlink:href="http://ivo.garant.ru/document/redirect/57467535/16">комментарии</text:a> к статье 16 настоящего Федерального закона</text:p>
      <text:p text:style-name="s9"/>
      <table:table table:name="10206" table:style-name="10206">
        <table:table-column table:style-name="6806"/>
        <table:table-column table:style-name="3400"/>
        <table:table-row>
          <table:table-cell>
            <text:p text:style-name="s16_fi0">Президент Российской Федерации</text:p>
          </table:table-cell>
          <table:table-cell>
            <text:p text:style-name="s1_right_fi0">В. Путин</text:p>
          </table:table-cell>
        </table:table-row>
      </table:table>
      <text:p text:style-name="s1"/>
      <text:p text:style-name="s1_fi0">Москва, Кремль</text:p>
      <text:p text:style-name="s1_fi0">29 июля 2004 года</text:p>
      <text:p text:style-name="s1_fi0">N 98-ФЗ</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Федеральный закон от 29 июля 2004 г. N 98-ФЗ "О коммерческой тайне" (с изменениями и дополнениями)</text:p>
      </style:header>
      <style:footer>
        <table:table>
          <table:table-column table:number-columns-repeated="3"/>
          <table:table-row>
            <table:table-cell>
              <text:p text:style-name="footer_left">
							<text:date style:data-style-name="date" text:fixed="true" text:date-value="2026-6-29"/>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